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z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2^([.C1:.I1]-[.A3:.A9]-1)" office:value-type="float" office:value="0.5" calcext:value-type="float">
            <text:p>0.5</text:p>
          </table:table-cell>
          <table:table-cell table:formula="of:=2^([.C1:.I1]-[.A3:.A9]-1)" office:value-type="float" office:value="1" calcext:value-type="float">
            <text:p>1</text:p>
          </table:table-cell>
          <table:table-cell table:formula="of:=2^([.C1:.I1]-[.A3:.A9]-1)" office:value-type="float" office:value="2" calcext:value-type="float">
            <text:p>2</text:p>
          </table:table-cell>
          <table:table-cell table:formula="of:=2^([.C1:.I1]-[.A3:.A9]-1)" office:value-type="float" office:value="4" calcext:value-type="float">
            <text:p>4</text:p>
          </table:table-cell>
          <table:table-cell table:formula="of:=2^([.C1:.I1]-[.A3:.A9]-1)" office:value-type="float" office:value="8" calcext:value-type="float">
            <text:p>8</text:p>
          </table:table-cell>
          <table:table-cell table:formula="of:=2^([.C1:.I1]-[.A3:.A9]-1)" office:value-type="float" office:value="16" calcext:value-type="float">
            <text:p>16</text:p>
          </table:table-cell>
          <table:table-cell table:formula="of:=2^([.C1:.I1]-[.A3:.A9]-1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^([.C1:.I1]-[.A3:.A9]-1)" office:value-type="float" office:value="0.25" calcext:value-type="float">
            <text:p>0.25</text:p>
          </table:table-cell>
          <table:table-cell table:formula="of:=2^([.C1:.I1]-[.A3:.A9]-1)" office:value-type="float" office:value="0.5" calcext:value-type="float">
            <text:p>0.5</text:p>
          </table:table-cell>
          <table:table-cell table:formula="of:=2^([.C1:.I1]-[.A3:.A9]-1)" office:value-type="float" office:value="1" calcext:value-type="float">
            <text:p>1</text:p>
          </table:table-cell>
          <table:table-cell table:formula="of:=2^([.C1:.I1]-[.A3:.A9]-1)" office:value-type="float" office:value="2" calcext:value-type="float">
            <text:p>2</text:p>
          </table:table-cell>
          <table:table-cell table:formula="of:=2^([.C1:.I1]-[.A3:.A9]-1)" office:value-type="float" office:value="4" calcext:value-type="float">
            <text:p>4</text:p>
          </table:table-cell>
          <table:table-cell table:formula="of:=2^([.C1:.I1]-[.A3:.A9]-1)" office:value-type="float" office:value="8" calcext:value-type="float">
            <text:p>8</text:p>
          </table:table-cell>
          <table:table-cell table:formula="of:=2^([.C1:.I1]-[.A3:.A9]-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^([.C1:.I1]-[.A3:.A9]-1)" office:value-type="float" office:value="0.125" calcext:value-type="float">
            <text:p>0.125</text:p>
          </table:table-cell>
          <table:table-cell table:formula="of:=2^([.C1:.I1]-[.A3:.A9]-1)" office:value-type="float" office:value="0.25" calcext:value-type="float">
            <text:p>0.25</text:p>
          </table:table-cell>
          <table:table-cell table:formula="of:=2^([.C1:.I1]-[.A3:.A9]-1)" office:value-type="float" office:value="0.5" calcext:value-type="float">
            <text:p>0.5</text:p>
          </table:table-cell>
          <table:table-cell table:formula="of:=2^([.C1:.I1]-[.A3:.A9]-1)" office:value-type="float" office:value="1" calcext:value-type="float">
            <text:p>1</text:p>
          </table:table-cell>
          <table:table-cell table:formula="of:=2^([.C1:.I1]-[.A3:.A9]-1)" office:value-type="float" office:value="2" calcext:value-type="float">
            <text:p>2</text:p>
          </table:table-cell>
          <table:table-cell table:formula="of:=2^([.C1:.I1]-[.A3:.A9]-1)" office:value-type="float" office:value="4" calcext:value-type="float">
            <text:p>4</text:p>
          </table:table-cell>
          <table:table-cell table:formula="of:=2^([.C1:.I1]-[.A3:.A9]-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^([.C1:.I1]-[.A3:.A9]-1)" office:value-type="float" office:value="0.0625" calcext:value-type="float">
            <text:p>0.0625</text:p>
          </table:table-cell>
          <table:table-cell table:formula="of:=2^([.C1:.I1]-[.A3:.A9]-1)" office:value-type="float" office:value="0.125" calcext:value-type="float">
            <text:p>0.125</text:p>
          </table:table-cell>
          <table:table-cell table:formula="of:=2^([.C1:.I1]-[.A3:.A9]-1)" office:value-type="float" office:value="0.25" calcext:value-type="float">
            <text:p>0.25</text:p>
          </table:table-cell>
          <table:table-cell table:formula="of:=2^([.C1:.I1]-[.A3:.A9]-1)" office:value-type="float" office:value="0.5" calcext:value-type="float">
            <text:p>0.5</text:p>
          </table:table-cell>
          <table:table-cell table:formula="of:=2^([.C1:.I1]-[.A3:.A9]-1)" office:value-type="float" office:value="1" calcext:value-type="float">
            <text:p>1</text:p>
          </table:table-cell>
          <table:table-cell table:formula="of:=2^([.C1:.I1]-[.A3:.A9]-1)" office:value-type="float" office:value="2" calcext:value-type="float">
            <text:p>2</text:p>
          </table:table-cell>
          <table:table-cell table:formula="of:=2^([.C1:.I1]-[.A3:.A9]-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^([.C1:.I1]-[.A3:.A9]-1)" office:value-type="float" office:value="0.03125" calcext:value-type="float">
            <text:p>0.03125</text:p>
          </table:table-cell>
          <table:table-cell table:formula="of:=2^([.C1:.I1]-[.A3:.A9]-1)" office:value-type="float" office:value="0.0625" calcext:value-type="float">
            <text:p>0.0625</text:p>
          </table:table-cell>
          <table:table-cell table:formula="of:=2^([.C1:.I1]-[.A3:.A9]-1)" office:value-type="float" office:value="0.125" calcext:value-type="float">
            <text:p>0.125</text:p>
          </table:table-cell>
          <table:table-cell table:formula="of:=2^([.C1:.I1]-[.A3:.A9]-1)" office:value-type="float" office:value="0.25" calcext:value-type="float">
            <text:p>0.25</text:p>
          </table:table-cell>
          <table:table-cell table:formula="of:=2^([.C1:.I1]-[.A3:.A9]-1)" office:value-type="float" office:value="0.5" calcext:value-type="float">
            <text:p>0.5</text:p>
          </table:table-cell>
          <table:table-cell table:formula="of:=2^([.C1:.I1]-[.A3:.A9]-1)" office:value-type="float" office:value="1" calcext:value-type="float">
            <text:p>1</text:p>
          </table:table-cell>
          <table:table-cell table:formula="of:=2^([.C1:.I1]-[.A3:.A9]-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^([.C1:.I1]-[.A3:.A9]-1)" office:value-type="float" office:value="0.015625" calcext:value-type="float">
            <text:p>0.015625</text:p>
          </table:table-cell>
          <table:table-cell table:formula="of:=2^([.C1:.I1]-[.A3:.A9]-1)" office:value-type="float" office:value="0.03125" calcext:value-type="float">
            <text:p>0.03125</text:p>
          </table:table-cell>
          <table:table-cell table:formula="of:=2^([.C1:.I1]-[.A3:.A9]-1)" office:value-type="float" office:value="0.0625" calcext:value-type="float">
            <text:p>0.0625</text:p>
          </table:table-cell>
          <table:table-cell table:formula="of:=2^([.C1:.I1]-[.A3:.A9]-1)" office:value-type="float" office:value="0.125" calcext:value-type="float">
            <text:p>0.125</text:p>
          </table:table-cell>
          <table:table-cell table:formula="of:=2^([.C1:.I1]-[.A3:.A9]-1)" office:value-type="float" office:value="0.25" calcext:value-type="float">
            <text:p>0.25</text:p>
          </table:table-cell>
          <table:table-cell table:formula="of:=2^([.C1:.I1]-[.A3:.A9]-1)" office:value-type="float" office:value="0.5" calcext:value-type="float">
            <text:p>0.5</text:p>
          </table:table-cell>
          <table:table-cell table:formula="of:=2^([.C1:.I1]-[.A3:.A9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2^([.C1:.I1]-[.A3:.A9]-1)" office:value-type="float" office:value="0.0078125" calcext:value-type="float">
            <text:p>0.0078125</text:p>
          </table:table-cell>
          <table:table-cell table:formula="of:=2^([.C1:.I1]-[.A3:.A9]-1)" office:value-type="float" office:value="0.015625" calcext:value-type="float">
            <text:p>0.015625</text:p>
          </table:table-cell>
          <table:table-cell table:formula="of:=2^([.C1:.I1]-[.A3:.A9]-1)" office:value-type="float" office:value="0.03125" calcext:value-type="float">
            <text:p>0.03125</text:p>
          </table:table-cell>
          <table:table-cell table:formula="of:=2^([.C1:.I1]-[.A3:.A9]-1)" office:value-type="float" office:value="0.0625" calcext:value-type="float">
            <text:p>0.0625</text:p>
          </table:table-cell>
          <table:table-cell table:formula="of:=2^([.C1:.I1]-[.A3:.A9]-1)" office:value-type="float" office:value="0.125" calcext:value-type="float">
            <text:p>0.125</text:p>
          </table:table-cell>
          <table:table-cell table:formula="of:=2^([.C1:.I1]-[.A3:.A9]-1)" office:value-type="float" office:value="0.25" calcext:value-type="float">
            <text:p>0.25</text:p>
          </table:table-cell>
          <table:table-cell table:formula="of:=2^([.C1:.I1]-[.A3:.A9]-1)" office:value-type="float" office:value="0.5" calcext:value-type="float">
            <text:p>0.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3*2^([.C1:.I1]-[.A11:.A17]-1)" office:value-type="float" office:value="1.5" calcext:value-type="float">
            <text:p>1.5</text:p>
          </table:table-cell>
          <table:table-cell table:formula="of:=3*2^([.C1:.I1]-[.A11:.A17]-1)" office:value-type="float" office:value="3" calcext:value-type="float">
            <text:p>3</text:p>
          </table:table-cell>
          <table:table-cell table:formula="of:=3*2^([.C1:.I1]-[.A11:.A17]-1)" office:value-type="float" office:value="6" calcext:value-type="float">
            <text:p>6</text:p>
          </table:table-cell>
          <table:table-cell table:formula="of:=3*2^([.C1:.I1]-[.A11:.A17]-1)" office:value-type="float" office:value="12" calcext:value-type="float">
            <text:p>12</text:p>
          </table:table-cell>
          <table:table-cell table:formula="of:=3*2^([.C1:.I1]-[.A11:.A17]-1)" office:value-type="float" office:value="24" calcext:value-type="float">
            <text:p>24</text:p>
          </table:table-cell>
          <table:table-cell table:formula="of:=3*2^([.C1:.I1]-[.A11:.A17]-1)" office:value-type="float" office:value="48" calcext:value-type="float">
            <text:p>48</text:p>
          </table:table-cell>
          <table:table-cell table:formula="of:=3*2^([.C1:.I1]-[.A11:.A17]-1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3*2^([.C1:.I1]-[.A11:.A17]-1)" office:value-type="float" office:value="0.75" calcext:value-type="float">
            <text:p>0.75</text:p>
          </table:table-cell>
          <table:table-cell table:formula="of:=3*2^([.C1:.I1]-[.A11:.A17]-1)" office:value-type="float" office:value="1.5" calcext:value-type="float">
            <text:p>1.5</text:p>
          </table:table-cell>
          <table:table-cell table:formula="of:=3*2^([.C1:.I1]-[.A11:.A17]-1)" office:value-type="float" office:value="3" calcext:value-type="float">
            <text:p>3</text:p>
          </table:table-cell>
          <table:table-cell table:formula="of:=3*2^([.C1:.I1]-[.A11:.A17]-1)" office:value-type="float" office:value="6" calcext:value-type="float">
            <text:p>6</text:p>
          </table:table-cell>
          <table:table-cell table:formula="of:=3*2^([.C1:.I1]-[.A11:.A17]-1)" office:value-type="float" office:value="12" calcext:value-type="float">
            <text:p>12</text:p>
          </table:table-cell>
          <table:table-cell table:formula="of:=3*2^([.C1:.I1]-[.A11:.A17]-1)" office:value-type="float" office:value="24" calcext:value-type="float">
            <text:p>24</text:p>
          </table:table-cell>
          <table:table-cell table:formula="of:=3*2^([.C1:.I1]-[.A11:.A17]-1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3*2^([.C1:.I1]-[.A11:.A17]-1)" office:value-type="float" office:value="0.375" calcext:value-type="float">
            <text:p>0.375</text:p>
          </table:table-cell>
          <table:table-cell table:formula="of:=3*2^([.C1:.I1]-[.A11:.A17]-1)" office:value-type="float" office:value="0.75" calcext:value-type="float">
            <text:p>0.75</text:p>
          </table:table-cell>
          <table:table-cell table:formula="of:=3*2^([.C1:.I1]-[.A11:.A17]-1)" office:value-type="float" office:value="1.5" calcext:value-type="float">
            <text:p>1.5</text:p>
          </table:table-cell>
          <table:table-cell table:formula="of:=3*2^([.C1:.I1]-[.A11:.A17]-1)" office:value-type="float" office:value="3" calcext:value-type="float">
            <text:p>3</text:p>
          </table:table-cell>
          <table:table-cell table:formula="of:=3*2^([.C1:.I1]-[.A11:.A17]-1)" office:value-type="float" office:value="6" calcext:value-type="float">
            <text:p>6</text:p>
          </table:table-cell>
          <table:table-cell table:formula="of:=3*2^([.C1:.I1]-[.A11:.A17]-1)" office:value-type="float" office:value="12" calcext:value-type="float">
            <text:p>12</text:p>
          </table:table-cell>
          <table:table-cell table:formula="of:=3*2^([.C1:.I1]-[.A11:.A17]-1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3*2^([.C1:.I1]-[.A11:.A17]-1)" office:value-type="float" office:value="0.1875" calcext:value-type="float">
            <text:p>0.1875</text:p>
          </table:table-cell>
          <table:table-cell table:formula="of:=3*2^([.C1:.I1]-[.A11:.A17]-1)" office:value-type="float" office:value="0.375" calcext:value-type="float">
            <text:p>0.375</text:p>
          </table:table-cell>
          <table:table-cell table:formula="of:=3*2^([.C1:.I1]-[.A11:.A17]-1)" office:value-type="float" office:value="0.75" calcext:value-type="float">
            <text:p>0.75</text:p>
          </table:table-cell>
          <table:table-cell table:formula="of:=3*2^([.C1:.I1]-[.A11:.A17]-1)" office:value-type="float" office:value="1.5" calcext:value-type="float">
            <text:p>1.5</text:p>
          </table:table-cell>
          <table:table-cell table:formula="of:=3*2^([.C1:.I1]-[.A11:.A17]-1)" office:value-type="float" office:value="3" calcext:value-type="float">
            <text:p>3</text:p>
          </table:table-cell>
          <table:table-cell table:formula="of:=3*2^([.C1:.I1]-[.A11:.A17]-1)" office:value-type="float" office:value="6" calcext:value-type="float">
            <text:p>6</text:p>
          </table:table-cell>
          <table:table-cell table:formula="of:=3*2^([.C1:.I1]-[.A11:.A17]-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3*2^([.C1:.I1]-[.A11:.A17]-1)" office:value-type="float" office:value="0.09375" calcext:value-type="float">
            <text:p>0.09375</text:p>
          </table:table-cell>
          <table:table-cell table:formula="of:=3*2^([.C1:.I1]-[.A11:.A17]-1)" office:value-type="float" office:value="0.1875" calcext:value-type="float">
            <text:p>0.1875</text:p>
          </table:table-cell>
          <table:table-cell table:formula="of:=3*2^([.C1:.I1]-[.A11:.A17]-1)" office:value-type="float" office:value="0.375" calcext:value-type="float">
            <text:p>0.375</text:p>
          </table:table-cell>
          <table:table-cell table:formula="of:=3*2^([.C1:.I1]-[.A11:.A17]-1)" office:value-type="float" office:value="0.75" calcext:value-type="float">
            <text:p>0.75</text:p>
          </table:table-cell>
          <table:table-cell table:formula="of:=3*2^([.C1:.I1]-[.A11:.A17]-1)" office:value-type="float" office:value="1.5" calcext:value-type="float">
            <text:p>1.5</text:p>
          </table:table-cell>
          <table:table-cell table:formula="of:=3*2^([.C1:.I1]-[.A11:.A17]-1)" office:value-type="float" office:value="3" calcext:value-type="float">
            <text:p>3</text:p>
          </table:table-cell>
          <table:table-cell table:formula="of:=3*2^([.C1:.I1]-[.A11:.A17]-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3*2^([.C1:.I1]-[.A11:.A17]-1)" office:value-type="float" office:value="0.046875" calcext:value-type="float">
            <text:p>0.046875</text:p>
          </table:table-cell>
          <table:table-cell table:formula="of:=3*2^([.C1:.I1]-[.A11:.A17]-1)" office:value-type="float" office:value="0.09375" calcext:value-type="float">
            <text:p>0.09375</text:p>
          </table:table-cell>
          <table:table-cell table:formula="of:=3*2^([.C1:.I1]-[.A11:.A17]-1)" office:value-type="float" office:value="0.1875" calcext:value-type="float">
            <text:p>0.1875</text:p>
          </table:table-cell>
          <table:table-cell table:formula="of:=3*2^([.C1:.I1]-[.A11:.A17]-1)" office:value-type="float" office:value="0.375" calcext:value-type="float">
            <text:p>0.375</text:p>
          </table:table-cell>
          <table:table-cell table:formula="of:=3*2^([.C1:.I1]-[.A11:.A17]-1)" office:value-type="float" office:value="0.75" calcext:value-type="float">
            <text:p>0.75</text:p>
          </table:table-cell>
          <table:table-cell table:formula="of:=3*2^([.C1:.I1]-[.A11:.A17]-1)" office:value-type="float" office:value="1.5" calcext:value-type="float">
            <text:p>1.5</text:p>
          </table:table-cell>
          <table:table-cell table:formula="of:=3*2^([.C1:.I1]-[.A11:.A17]-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3*2^([.C1:.I1]-[.A11:.A17]-1)" office:value-type="float" office:value="0.0234375" calcext:value-type="float">
            <text:p>0.0234375</text:p>
          </table:table-cell>
          <table:table-cell table:formula="of:=3*2^([.C1:.I1]-[.A11:.A17]-1)" office:value-type="float" office:value="0.046875" calcext:value-type="float">
            <text:p>0.046875</text:p>
          </table:table-cell>
          <table:table-cell table:formula="of:=3*2^([.C1:.I1]-[.A11:.A17]-1)" office:value-type="float" office:value="0.09375" calcext:value-type="float">
            <text:p>0.09375</text:p>
          </table:table-cell>
          <table:table-cell table:formula="of:=3*2^([.C1:.I1]-[.A11:.A17]-1)" office:value-type="float" office:value="0.1875" calcext:value-type="float">
            <text:p>0.1875</text:p>
          </table:table-cell>
          <table:table-cell table:formula="of:=3*2^([.C1:.I1]-[.A11:.A17]-1)" office:value-type="float" office:value="0.375" calcext:value-type="float">
            <text:p>0.375</text:p>
          </table:table-cell>
          <table:table-cell table:formula="of:=3*2^([.C1:.I1]-[.A11:.A17]-1)" office:value-type="float" office:value="0.75" calcext:value-type="float">
            <text:p>0.75</text:p>
          </table:table-cell>
          <table:table-cell table:formula="of:=3*2^([.C1:.I1]-[.A11:.A17]-1)" office:value-type="float" office:value="1.5" calcext:value-type="float">
            <text:p>1.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5*2^([.C1:.I1]-[.A19:.A25]-1)" office:value-type="float" office:value="2.5" calcext:value-type="float">
            <text:p>2.5</text:p>
          </table:table-cell>
          <table:table-cell table:formula="of:=5*2^([.C1:.I1]-[.A19:.A25]-1)" office:value-type="float" office:value="5" calcext:value-type="float">
            <text:p>5</text:p>
          </table:table-cell>
          <table:table-cell table:formula="of:=5*2^([.C1:.I1]-[.A19:.A25]-1)" office:value-type="float" office:value="10" calcext:value-type="float">
            <text:p>10</text:p>
          </table:table-cell>
          <table:table-cell table:formula="of:=5*2^([.C1:.I1]-[.A19:.A25]-1)" office:value-type="float" office:value="20" calcext:value-type="float">
            <text:p>20</text:p>
          </table:table-cell>
          <table:table-cell table:formula="of:=5*2^([.C1:.I1]-[.A19:.A25]-1)" office:value-type="float" office:value="40" calcext:value-type="float">
            <text:p>40</text:p>
          </table:table-cell>
          <table:table-cell table:formula="of:=5*2^([.C1:.I1]-[.A19:.A25]-1)" office:value-type="float" office:value="80" calcext:value-type="float">
            <text:p>80</text:p>
          </table:table-cell>
          <table:table-cell table:formula="of:=5*2^([.C1:.I1]-[.A19:.A25]-1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5*2^([.C1:.I1]-[.A19:.A25]-1)" office:value-type="float" office:value="1.25" calcext:value-type="float">
            <text:p>1.25</text:p>
          </table:table-cell>
          <table:table-cell table:formula="of:=5*2^([.C1:.I1]-[.A19:.A25]-1)" office:value-type="float" office:value="2.5" calcext:value-type="float">
            <text:p>2.5</text:p>
          </table:table-cell>
          <table:table-cell table:formula="of:=5*2^([.C1:.I1]-[.A19:.A25]-1)" office:value-type="float" office:value="5" calcext:value-type="float">
            <text:p>5</text:p>
          </table:table-cell>
          <table:table-cell table:formula="of:=5*2^([.C1:.I1]-[.A19:.A25]-1)" office:value-type="float" office:value="10" calcext:value-type="float">
            <text:p>10</text:p>
          </table:table-cell>
          <table:table-cell table:formula="of:=5*2^([.C1:.I1]-[.A19:.A25]-1)" office:value-type="float" office:value="20" calcext:value-type="float">
            <text:p>20</text:p>
          </table:table-cell>
          <table:table-cell table:formula="of:=5*2^([.C1:.I1]-[.A19:.A25]-1)" office:value-type="float" office:value="40" calcext:value-type="float">
            <text:p>40</text:p>
          </table:table-cell>
          <table:table-cell table:formula="of:=5*2^([.C1:.I1]-[.A19:.A25]-1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5*2^([.C1:.I1]-[.A19:.A25]-1)" office:value-type="float" office:value="0.625" calcext:value-type="float">
            <text:p>0.625</text:p>
          </table:table-cell>
          <table:table-cell table:formula="of:=5*2^([.C1:.I1]-[.A19:.A25]-1)" office:value-type="float" office:value="1.25" calcext:value-type="float">
            <text:p>1.25</text:p>
          </table:table-cell>
          <table:table-cell table:formula="of:=5*2^([.C1:.I1]-[.A19:.A25]-1)" office:value-type="float" office:value="2.5" calcext:value-type="float">
            <text:p>2.5</text:p>
          </table:table-cell>
          <table:table-cell table:formula="of:=5*2^([.C1:.I1]-[.A19:.A25]-1)" office:value-type="float" office:value="5" calcext:value-type="float">
            <text:p>5</text:p>
          </table:table-cell>
          <table:table-cell table:formula="of:=5*2^([.C1:.I1]-[.A19:.A25]-1)" office:value-type="float" office:value="10" calcext:value-type="float">
            <text:p>10</text:p>
          </table:table-cell>
          <table:table-cell table:formula="of:=5*2^([.C1:.I1]-[.A19:.A25]-1)" office:value-type="float" office:value="20" calcext:value-type="float">
            <text:p>20</text:p>
          </table:table-cell>
          <table:table-cell table:formula="of:=5*2^([.C1:.I1]-[.A19:.A25]-1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5*2^([.C1:.I1]-[.A19:.A25]-1)" office:value-type="float" office:value="0.3125" calcext:value-type="float">
            <text:p>0.3125</text:p>
          </table:table-cell>
          <table:table-cell table:formula="of:=5*2^([.C1:.I1]-[.A19:.A25]-1)" office:value-type="float" office:value="0.625" calcext:value-type="float">
            <text:p>0.625</text:p>
          </table:table-cell>
          <table:table-cell table:formula="of:=5*2^([.C1:.I1]-[.A19:.A25]-1)" office:value-type="float" office:value="1.25" calcext:value-type="float">
            <text:p>1.25</text:p>
          </table:table-cell>
          <table:table-cell table:formula="of:=5*2^([.C1:.I1]-[.A19:.A25]-1)" office:value-type="float" office:value="2.5" calcext:value-type="float">
            <text:p>2.5</text:p>
          </table:table-cell>
          <table:table-cell table:formula="of:=5*2^([.C1:.I1]-[.A19:.A25]-1)" office:value-type="float" office:value="5" calcext:value-type="float">
            <text:p>5</text:p>
          </table:table-cell>
          <table:table-cell table:formula="of:=5*2^([.C1:.I1]-[.A19:.A25]-1)" office:value-type="float" office:value="10" calcext:value-type="float">
            <text:p>10</text:p>
          </table:table-cell>
          <table:table-cell table:formula="of:=5*2^([.C1:.I1]-[.A19:.A25]-1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5*2^([.C1:.I1]-[.A19:.A25]-1)" office:value-type="float" office:value="0.15625" calcext:value-type="float">
            <text:p>0.15625</text:p>
          </table:table-cell>
          <table:table-cell table:formula="of:=5*2^([.C1:.I1]-[.A19:.A25]-1)" office:value-type="float" office:value="0.3125" calcext:value-type="float">
            <text:p>0.3125</text:p>
          </table:table-cell>
          <table:table-cell table:formula="of:=5*2^([.C1:.I1]-[.A19:.A25]-1)" office:value-type="float" office:value="0.625" calcext:value-type="float">
            <text:p>0.625</text:p>
          </table:table-cell>
          <table:table-cell table:formula="of:=5*2^([.C1:.I1]-[.A19:.A25]-1)" office:value-type="float" office:value="1.25" calcext:value-type="float">
            <text:p>1.25</text:p>
          </table:table-cell>
          <table:table-cell table:formula="of:=5*2^([.C1:.I1]-[.A19:.A25]-1)" office:value-type="float" office:value="2.5" calcext:value-type="float">
            <text:p>2.5</text:p>
          </table:table-cell>
          <table:table-cell table:formula="of:=5*2^([.C1:.I1]-[.A19:.A25]-1)" office:value-type="float" office:value="5" calcext:value-type="float">
            <text:p>5</text:p>
          </table:table-cell>
          <table:table-cell table:formula="of:=5*2^([.C1:.I1]-[.A19:.A25]-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5*2^([.C1:.I1]-[.A19:.A25]-1)" office:value-type="float" office:value="0.078125" calcext:value-type="float">
            <text:p>0.078125</text:p>
          </table:table-cell>
          <table:table-cell table:formula="of:=5*2^([.C1:.I1]-[.A19:.A25]-1)" office:value-type="float" office:value="0.15625" calcext:value-type="float">
            <text:p>0.15625</text:p>
          </table:table-cell>
          <table:table-cell table:formula="of:=5*2^([.C1:.I1]-[.A19:.A25]-1)" office:value-type="float" office:value="0.3125" calcext:value-type="float">
            <text:p>0.3125</text:p>
          </table:table-cell>
          <table:table-cell table:formula="of:=5*2^([.C1:.I1]-[.A19:.A25]-1)" office:value-type="float" office:value="0.625" calcext:value-type="float">
            <text:p>0.625</text:p>
          </table:table-cell>
          <table:table-cell table:formula="of:=5*2^([.C1:.I1]-[.A19:.A25]-1)" office:value-type="float" office:value="1.25" calcext:value-type="float">
            <text:p>1.25</text:p>
          </table:table-cell>
          <table:table-cell table:formula="of:=5*2^([.C1:.I1]-[.A19:.A25]-1)" office:value-type="float" office:value="2.5" calcext:value-type="float">
            <text:p>2.5</text:p>
          </table:table-cell>
          <table:table-cell table:formula="of:=5*2^([.C1:.I1]-[.A19:.A25]-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5*2^([.C1:.I1]-[.A19:.A25]-1)" office:value-type="float" office:value="0.0390625" calcext:value-type="float">
            <text:p>0.0390625</text:p>
          </table:table-cell>
          <table:table-cell table:formula="of:=5*2^([.C1:.I1]-[.A19:.A25]-1)" office:value-type="float" office:value="0.078125" calcext:value-type="float">
            <text:p>0.078125</text:p>
          </table:table-cell>
          <table:table-cell table:formula="of:=5*2^([.C1:.I1]-[.A19:.A25]-1)" office:value-type="float" office:value="0.15625" calcext:value-type="float">
            <text:p>0.15625</text:p>
          </table:table-cell>
          <table:table-cell table:formula="of:=5*2^([.C1:.I1]-[.A19:.A25]-1)" office:value-type="float" office:value="0.3125" calcext:value-type="float">
            <text:p>0.3125</text:p>
          </table:table-cell>
          <table:table-cell table:formula="of:=5*2^([.C1:.I1]-[.A19:.A25]-1)" office:value-type="float" office:value="0.625" calcext:value-type="float">
            <text:p>0.625</text:p>
          </table:table-cell>
          <table:table-cell table:formula="of:=5*2^([.C1:.I1]-[.A19:.A25]-1)" office:value-type="float" office:value="1.25" calcext:value-type="float">
            <text:p>1.25</text:p>
          </table:table-cell>
          <table:table-cell table:formula="of:=5*2^([.C1:.I1]-[.A19:.A25]-1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ctual BCD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MOD((2^([.C1:.I1]-[.A27:.A33]-1)); 16)+(FLOOR((2^([.C1:.I1]-[.A27:.A33]-1))/16)  * 10)" office:value-type="float" office:value="0.5" calcext:value-type="float">
            <text:p>0.5</text:p>
          </table:table-cell>
          <table:table-cell table:formula="of:=MOD((2^([.C1:.I1]-[.A27:.A33]-1)); 16)+(FLOOR((2^([.C1:.I1]-[.A27:.A33]-1))/16)  * 10)" office:value-type="float" office:value="1" calcext:value-type="float">
            <text:p>1</text:p>
          </table:table-cell>
          <table:table-cell table:formula="of:=MOD((2^([.C1:.I1]-[.A27:.A33]-1)); 16)+(FLOOR((2^([.C1:.I1]-[.A27:.A33]-1))/16)  * 10)" office:value-type="float" office:value="2" calcext:value-type="float">
            <text:p>2</text:p>
          </table:table-cell>
          <table:table-cell table:formula="of:=MOD((2^([.C1:.I1]-[.A27:.A33]-1)); 16)+(FLOOR((2^([.C1:.I1]-[.A27:.A33]-1))/16)  * 10)" office:value-type="float" office:value="4" calcext:value-type="float">
            <text:p>4</text:p>
          </table:table-cell>
          <table:table-cell table:formula="of:=MOD((2^([.C1:.I1]-[.A27:.A33]-1)); 16)+(FLOOR((2^([.C1:.I1]-[.A27:.A33]-1))/16)  * 10)" office:value-type="float" office:value="8" calcext:value-type="float">
            <text:p>8</text:p>
          </table:table-cell>
          <table:table-cell table:formula="of:=MOD((2^([.C1:.I1]-[.A27:.A33]-1)); 16)+(FLOOR((2^([.C1:.I1]-[.A27:.A33]-1))/16)  * 10)" office:value-type="float" office:value="10" calcext:value-type="float">
            <text:p>10</text:p>
          </table:table-cell>
          <table:table-cell table:formula="of:=MOD((2^([.C1:.I1]-[.A27:.A33]-1)); 16)+(FLOOR((2^([.C1:.I1]-[.A27:.A33]-1))/16)  * 1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MOD((2^([.C1:.I1]-[.A27:.A33]-1)); 16)+(FLOOR((2^([.C1:.I1]-[.A27:.A33]-1))/16)  * 10)" office:value-type="float" office:value="0.25" calcext:value-type="float">
            <text:p>0.25</text:p>
          </table:table-cell>
          <table:table-cell table:formula="of:=MOD((2^([.C1:.I1]-[.A27:.A33]-1)); 16)+(FLOOR((2^([.C1:.I1]-[.A27:.A33]-1))/16)  * 10)" office:value-type="float" office:value="0.5" calcext:value-type="float">
            <text:p>0.5</text:p>
          </table:table-cell>
          <table:table-cell table:formula="of:=MOD((2^([.C1:.I1]-[.A27:.A33]-1)); 16)+(FLOOR((2^([.C1:.I1]-[.A27:.A33]-1))/16)  * 10)" office:value-type="float" office:value="1" calcext:value-type="float">
            <text:p>1</text:p>
          </table:table-cell>
          <table:table-cell table:formula="of:=MOD((2^([.C1:.I1]-[.A27:.A33]-1)); 16)+(FLOOR((2^([.C1:.I1]-[.A27:.A33]-1))/16)  * 10)" office:value-type="float" office:value="2" calcext:value-type="float">
            <text:p>2</text:p>
          </table:table-cell>
          <table:table-cell table:formula="of:=MOD((2^([.C1:.I1]-[.A27:.A33]-1)); 16)+(FLOOR((2^([.C1:.I1]-[.A27:.A33]-1))/16)  * 10)" office:value-type="float" office:value="4" calcext:value-type="float">
            <text:p>4</text:p>
          </table:table-cell>
          <table:table-cell table:formula="of:=MOD((2^([.C1:.I1]-[.A27:.A33]-1)); 16)+(FLOOR((2^([.C1:.I1]-[.A27:.A33]-1))/16)  * 10)" office:value-type="float" office:value="8" calcext:value-type="float">
            <text:p>8</text:p>
          </table:table-cell>
          <table:table-cell table:formula="of:=MOD((2^([.C1:.I1]-[.A27:.A33]-1)); 16)+(FLOOR((2^([.C1:.I1]-[.A27:.A33]-1))/16)  * 1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MOD((2^([.C1:.I1]-[.A27:.A33]-1)); 16)+(FLOOR((2^([.C1:.I1]-[.A27:.A33]-1))/16)  * 10)" office:value-type="float" office:value="0.125" calcext:value-type="float">
            <text:p>0.125</text:p>
          </table:table-cell>
          <table:table-cell table:formula="of:=MOD((2^([.C1:.I1]-[.A27:.A33]-1)); 16)+(FLOOR((2^([.C1:.I1]-[.A27:.A33]-1))/16)  * 10)" office:value-type="float" office:value="0.25" calcext:value-type="float">
            <text:p>0.25</text:p>
          </table:table-cell>
          <table:table-cell table:formula="of:=MOD((2^([.C1:.I1]-[.A27:.A33]-1)); 16)+(FLOOR((2^([.C1:.I1]-[.A27:.A33]-1))/16)  * 10)" office:value-type="float" office:value="0.5" calcext:value-type="float">
            <text:p>0.5</text:p>
          </table:table-cell>
          <table:table-cell table:formula="of:=MOD((2^([.C1:.I1]-[.A27:.A33]-1)); 16)+(FLOOR((2^([.C1:.I1]-[.A27:.A33]-1))/16)  * 10)" office:value-type="float" office:value="1" calcext:value-type="float">
            <text:p>1</text:p>
          </table:table-cell>
          <table:table-cell table:formula="of:=MOD((2^([.C1:.I1]-[.A27:.A33]-1)); 16)+(FLOOR((2^([.C1:.I1]-[.A27:.A33]-1))/16)  * 10)" office:value-type="float" office:value="2" calcext:value-type="float">
            <text:p>2</text:p>
          </table:table-cell>
          <table:table-cell table:formula="of:=MOD((2^([.C1:.I1]-[.A27:.A33]-1)); 16)+(FLOOR((2^([.C1:.I1]-[.A27:.A33]-1))/16)  * 10)" office:value-type="float" office:value="4" calcext:value-type="float">
            <text:p>4</text:p>
          </table:table-cell>
          <table:table-cell table:formula="of:=MOD((2^([.C1:.I1]-[.A27:.A33]-1)); 16)+(FLOOR((2^([.C1:.I1]-[.A27:.A33]-1))/16)  * 1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MOD((2^([.C1:.I1]-[.A27:.A33]-1)); 16)+(FLOOR((2^([.C1:.I1]-[.A27:.A33]-1))/16)  * 10)" office:value-type="float" office:value="0.0625" calcext:value-type="float">
            <text:p>0.0625</text:p>
          </table:table-cell>
          <table:table-cell table:formula="of:=MOD((2^([.C1:.I1]-[.A27:.A33]-1)); 16)+(FLOOR((2^([.C1:.I1]-[.A27:.A33]-1))/16)  * 10)" office:value-type="float" office:value="0.125" calcext:value-type="float">
            <text:p>0.125</text:p>
          </table:table-cell>
          <table:table-cell table:formula="of:=MOD((2^([.C1:.I1]-[.A27:.A33]-1)); 16)+(FLOOR((2^([.C1:.I1]-[.A27:.A33]-1))/16)  * 10)" office:value-type="float" office:value="0.25" calcext:value-type="float">
            <text:p>0.25</text:p>
          </table:table-cell>
          <table:table-cell table:formula="of:=MOD((2^([.C1:.I1]-[.A27:.A33]-1)); 16)+(FLOOR((2^([.C1:.I1]-[.A27:.A33]-1))/16)  * 10)" office:value-type="float" office:value="0.5" calcext:value-type="float">
            <text:p>0.5</text:p>
          </table:table-cell>
          <table:table-cell table:formula="of:=MOD((2^([.C1:.I1]-[.A27:.A33]-1)); 16)+(FLOOR((2^([.C1:.I1]-[.A27:.A33]-1))/16)  * 10)" office:value-type="float" office:value="1" calcext:value-type="float">
            <text:p>1</text:p>
          </table:table-cell>
          <table:table-cell table:formula="of:=MOD((2^([.C1:.I1]-[.A27:.A33]-1)); 16)+(FLOOR((2^([.C1:.I1]-[.A27:.A33]-1))/16)  * 10)" office:value-type="float" office:value="2" calcext:value-type="float">
            <text:p>2</text:p>
          </table:table-cell>
          <table:table-cell table:formula="of:=MOD((2^([.C1:.I1]-[.A27:.A33]-1)); 16)+(FLOOR((2^([.C1:.I1]-[.A27:.A33]-1))/16)  * 1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MOD((2^([.C1:.I1]-[.A27:.A33]-1)); 16)+(FLOOR((2^([.C1:.I1]-[.A27:.A33]-1))/16)  * 10)" office:value-type="float" office:value="0.03125" calcext:value-type="float">
            <text:p>0.03125</text:p>
          </table:table-cell>
          <table:table-cell table:formula="of:=MOD((2^([.C1:.I1]-[.A27:.A33]-1)); 16)+(FLOOR((2^([.C1:.I1]-[.A27:.A33]-1))/16)  * 10)" office:value-type="float" office:value="0.0625" calcext:value-type="float">
            <text:p>0.0625</text:p>
          </table:table-cell>
          <table:table-cell table:formula="of:=MOD((2^([.C1:.I1]-[.A27:.A33]-1)); 16)+(FLOOR((2^([.C1:.I1]-[.A27:.A33]-1))/16)  * 10)" office:value-type="float" office:value="0.125" calcext:value-type="float">
            <text:p>0.125</text:p>
          </table:table-cell>
          <table:table-cell table:formula="of:=MOD((2^([.C1:.I1]-[.A27:.A33]-1)); 16)+(FLOOR((2^([.C1:.I1]-[.A27:.A33]-1))/16)  * 10)" office:value-type="float" office:value="0.25" calcext:value-type="float">
            <text:p>0.25</text:p>
          </table:table-cell>
          <table:table-cell table:formula="of:=MOD((2^([.C1:.I1]-[.A27:.A33]-1)); 16)+(FLOOR((2^([.C1:.I1]-[.A27:.A33]-1))/16)  * 10)" office:value-type="float" office:value="0.5" calcext:value-type="float">
            <text:p>0.5</text:p>
          </table:table-cell>
          <table:table-cell table:formula="of:=MOD((2^([.C1:.I1]-[.A27:.A33]-1)); 16)+(FLOOR((2^([.C1:.I1]-[.A27:.A33]-1))/16)  * 10)" office:value-type="float" office:value="1" calcext:value-type="float">
            <text:p>1</text:p>
          </table:table-cell>
          <table:table-cell table:formula="of:=MOD((2^([.C1:.I1]-[.A27:.A33]-1)); 16)+(FLOOR((2^([.C1:.I1]-[.A27:.A33]-1))/16)  * 1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MOD((2^([.C1:.I1]-[.A27:.A33]-1)); 16)+(FLOOR((2^([.C1:.I1]-[.A27:.A33]-1))/16)  * 10)" office:value-type="float" office:value="0.015625" calcext:value-type="float">
            <text:p>0.015625</text:p>
          </table:table-cell>
          <table:table-cell table:formula="of:=MOD((2^([.C1:.I1]-[.A27:.A33]-1)); 16)+(FLOOR((2^([.C1:.I1]-[.A27:.A33]-1))/16)  * 10)" office:value-type="float" office:value="0.03125" calcext:value-type="float">
            <text:p>0.03125</text:p>
          </table:table-cell>
          <table:table-cell table:formula="of:=MOD((2^([.C1:.I1]-[.A27:.A33]-1)); 16)+(FLOOR((2^([.C1:.I1]-[.A27:.A33]-1))/16)  * 10)" office:value-type="float" office:value="0.0625" calcext:value-type="float">
            <text:p>0.0625</text:p>
          </table:table-cell>
          <table:table-cell table:formula="of:=MOD((2^([.C1:.I1]-[.A27:.A33]-1)); 16)+(FLOOR((2^([.C1:.I1]-[.A27:.A33]-1))/16)  * 10)" office:value-type="float" office:value="0.125" calcext:value-type="float">
            <text:p>0.125</text:p>
          </table:table-cell>
          <table:table-cell table:formula="of:=MOD((2^([.C1:.I1]-[.A27:.A33]-1)); 16)+(FLOOR((2^([.C1:.I1]-[.A27:.A33]-1))/16)  * 10)" office:value-type="float" office:value="0.25" calcext:value-type="float">
            <text:p>0.25</text:p>
          </table:table-cell>
          <table:table-cell table:formula="of:=MOD((2^([.C1:.I1]-[.A27:.A33]-1)); 16)+(FLOOR((2^([.C1:.I1]-[.A27:.A33]-1))/16)  * 10)" office:value-type="float" office:value="0.5" calcext:value-type="float">
            <text:p>0.5</text:p>
          </table:table-cell>
          <table:table-cell table:formula="of:=MOD((2^([.C1:.I1]-[.A27:.A33]-1)); 16)+(FLOOR((2^([.C1:.I1]-[.A27:.A33]-1))/16)  * 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MOD((2^([.C1:.I1]-[.A27:.A33]-1)); 16)+(FLOOR((2^([.C1:.I1]-[.A27:.A33]-1))/16)  * 10)" office:value-type="float" office:value="0.0078125" calcext:value-type="float">
            <text:p>0.0078125</text:p>
          </table:table-cell>
          <table:table-cell table:formula="of:=MOD((2^([.C1:.I1]-[.A27:.A33]-1)); 16)+(FLOOR((2^([.C1:.I1]-[.A27:.A33]-1))/16)  * 10)" office:value-type="float" office:value="0.015625" calcext:value-type="float">
            <text:p>0.015625</text:p>
          </table:table-cell>
          <table:table-cell table:formula="of:=MOD((2^([.C1:.I1]-[.A27:.A33]-1)); 16)+(FLOOR((2^([.C1:.I1]-[.A27:.A33]-1))/16)  * 10)" office:value-type="float" office:value="0.03125" calcext:value-type="float">
            <text:p>0.03125</text:p>
          </table:table-cell>
          <table:table-cell table:formula="of:=MOD((2^([.C1:.I1]-[.A27:.A33]-1)); 16)+(FLOOR((2^([.C1:.I1]-[.A27:.A33]-1))/16)  * 10)" office:value-type="float" office:value="0.0625" calcext:value-type="float">
            <text:p>0.0625</text:p>
          </table:table-cell>
          <table:table-cell table:formula="of:=MOD((2^([.C1:.I1]-[.A27:.A33]-1)); 16)+(FLOOR((2^([.C1:.I1]-[.A27:.A33]-1))/16)  * 10)" office:value-type="float" office:value="0.125" calcext:value-type="float">
            <text:p>0.125</text:p>
          </table:table-cell>
          <table:table-cell table:formula="of:=MOD((2^([.C1:.I1]-[.A27:.A33]-1)); 16)+(FLOOR((2^([.C1:.I1]-[.A27:.A33]-1))/16)  * 10)" office:value-type="float" office:value="0.25" calcext:value-type="float">
            <text:p>0.25</text:p>
          </table:table-cell>
          <table:table-cell table:formula="of:=MOD((2^([.C1:.I1]-[.A27:.A33]-1)); 16)+(FLOOR((2^([.C1:.I1]-[.A27:.A33]-1))/16)  * 10)" office:value-type="float" office:value="0.5" calcext:value-type="float">
            <text:p>0.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MOD(3*(2^([.C1:.I1]-[.A35:.A41]-1)); 16)+(FLOOR(3*(2^([.C1:.I1]-[.A35:.A41]-1))/16)  * 10)" office:value-type="float" office:value="1.5" calcext:value-type="float">
            <text:p>1.5</text:p>
          </table:table-cell>
          <table:table-cell table:formula="of:=MOD(3*(2^([.C1:.I1]-[.A35:.A41]-1)); 16)+(FLOOR(3*(2^([.C1:.I1]-[.A35:.A41]-1))/16)  * 10)" office:value-type="float" office:value="3" calcext:value-type="float">
            <text:p>3</text:p>
          </table:table-cell>
          <table:table-cell table:formula="of:=MOD(3*(2^([.C1:.I1]-[.A35:.A41]-1)); 16)+(FLOOR(3*(2^([.C1:.I1]-[.A35:.A41]-1))/16)  * 10)" office:value-type="float" office:value="6" calcext:value-type="float">
            <text:p>6</text:p>
          </table:table-cell>
          <table:table-cell table:formula="of:=MOD(3*(2^([.C1:.I1]-[.A35:.A41]-1)); 16)+(FLOOR(3*(2^([.C1:.I1]-[.A35:.A41]-1))/16)  * 10)" office:value-type="float" office:value="12" calcext:value-type="float">
            <text:p>12</text:p>
          </table:table-cell>
          <table:table-cell table:formula="of:=MOD(3*(2^([.C1:.I1]-[.A35:.A41]-1)); 16)+(FLOOR(3*(2^([.C1:.I1]-[.A35:.A41]-1))/16)  * 10)" office:value-type="float" office:value="18" calcext:value-type="float">
            <text:p>18</text:p>
          </table:table-cell>
          <table:table-cell table:formula="of:=MOD(3*(2^([.C1:.I1]-[.A35:.A41]-1)); 16)+(FLOOR(3*(2^([.C1:.I1]-[.A35:.A41]-1))/16)  * 10)" office:value-type="float" office:value="30" calcext:value-type="float">
            <text:p>30</text:p>
          </table:table-cell>
          <table:table-cell table:formula="of:=MOD(3*(2^([.C1:.I1]-[.A35:.A41]-1)); 16)+(FLOOR(3*(2^([.C1:.I1]-[.A35:.A41]-1))/16)  * 1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MOD(3*(2^([.C1:.I1]-[.A35:.A41]-1)); 16)+(FLOOR(3*(2^([.C1:.I1]-[.A35:.A41]-1))/16)  * 10)" office:value-type="float" office:value="0.75" calcext:value-type="float">
            <text:p>0.75</text:p>
          </table:table-cell>
          <table:table-cell table:formula="of:=MOD(3*(2^([.C1:.I1]-[.A35:.A41]-1)); 16)+(FLOOR(3*(2^([.C1:.I1]-[.A35:.A41]-1))/16)  * 10)" office:value-type="float" office:value="1.5" calcext:value-type="float">
            <text:p>1.5</text:p>
          </table:table-cell>
          <table:table-cell table:formula="of:=MOD(3*(2^([.C1:.I1]-[.A35:.A41]-1)); 16)+(FLOOR(3*(2^([.C1:.I1]-[.A35:.A41]-1))/16)  * 10)" office:value-type="float" office:value="3" calcext:value-type="float">
            <text:p>3</text:p>
          </table:table-cell>
          <table:table-cell table:formula="of:=MOD(3*(2^([.C1:.I1]-[.A35:.A41]-1)); 16)+(FLOOR(3*(2^([.C1:.I1]-[.A35:.A41]-1))/16)  * 10)" office:value-type="float" office:value="6" calcext:value-type="float">
            <text:p>6</text:p>
          </table:table-cell>
          <table:table-cell table:formula="of:=MOD(3*(2^([.C1:.I1]-[.A35:.A41]-1)); 16)+(FLOOR(3*(2^([.C1:.I1]-[.A35:.A41]-1))/16)  * 10)" office:value-type="float" office:value="12" calcext:value-type="float">
            <text:p>12</text:p>
          </table:table-cell>
          <table:table-cell table:formula="of:=MOD(3*(2^([.C1:.I1]-[.A35:.A41]-1)); 16)+(FLOOR(3*(2^([.C1:.I1]-[.A35:.A41]-1))/16)  * 10)" office:value-type="float" office:value="18" calcext:value-type="float">
            <text:p>18</text:p>
          </table:table-cell>
          <table:table-cell table:formula="of:=MOD(3*(2^([.C1:.I1]-[.A35:.A41]-1)); 16)+(FLOOR(3*(2^([.C1:.I1]-[.A35:.A41]-1))/16)  * 1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MOD(3*(2^([.C1:.I1]-[.A35:.A41]-1)); 16)+(FLOOR(3*(2^([.C1:.I1]-[.A35:.A41]-1))/16)  * 10)" office:value-type="float" office:value="0.375" calcext:value-type="float">
            <text:p>0.375</text:p>
          </table:table-cell>
          <table:table-cell table:formula="of:=MOD(3*(2^([.C1:.I1]-[.A35:.A41]-1)); 16)+(FLOOR(3*(2^([.C1:.I1]-[.A35:.A41]-1))/16)  * 10)" office:value-type="float" office:value="0.75" calcext:value-type="float">
            <text:p>0.75</text:p>
          </table:table-cell>
          <table:table-cell table:formula="of:=MOD(3*(2^([.C1:.I1]-[.A35:.A41]-1)); 16)+(FLOOR(3*(2^([.C1:.I1]-[.A35:.A41]-1))/16)  * 10)" office:value-type="float" office:value="1.5" calcext:value-type="float">
            <text:p>1.5</text:p>
          </table:table-cell>
          <table:table-cell table:formula="of:=MOD(3*(2^([.C1:.I1]-[.A35:.A41]-1)); 16)+(FLOOR(3*(2^([.C1:.I1]-[.A35:.A41]-1))/16)  * 10)" office:value-type="float" office:value="3" calcext:value-type="float">
            <text:p>3</text:p>
          </table:table-cell>
          <table:table-cell table:formula="of:=MOD(3*(2^([.C1:.I1]-[.A35:.A41]-1)); 16)+(FLOOR(3*(2^([.C1:.I1]-[.A35:.A41]-1))/16)  * 10)" office:value-type="float" office:value="6" calcext:value-type="float">
            <text:p>6</text:p>
          </table:table-cell>
          <table:table-cell table:formula="of:=MOD(3*(2^([.C1:.I1]-[.A35:.A41]-1)); 16)+(FLOOR(3*(2^([.C1:.I1]-[.A35:.A41]-1))/16)  * 10)" office:value-type="float" office:value="12" calcext:value-type="float">
            <text:p>12</text:p>
          </table:table-cell>
          <table:table-cell table:formula="of:=MOD(3*(2^([.C1:.I1]-[.A35:.A41]-1)); 16)+(FLOOR(3*(2^([.C1:.I1]-[.A35:.A41]-1))/16)  * 1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MOD(3*(2^([.C1:.I1]-[.A35:.A41]-1)); 16)+(FLOOR(3*(2^([.C1:.I1]-[.A35:.A41]-1))/16)  * 10)" office:value-type="float" office:value="0.1875" calcext:value-type="float">
            <text:p>0.1875</text:p>
          </table:table-cell>
          <table:table-cell table:formula="of:=MOD(3*(2^([.C1:.I1]-[.A35:.A41]-1)); 16)+(FLOOR(3*(2^([.C1:.I1]-[.A35:.A41]-1))/16)  * 10)" office:value-type="float" office:value="0.375" calcext:value-type="float">
            <text:p>0.375</text:p>
          </table:table-cell>
          <table:table-cell table:formula="of:=MOD(3*(2^([.C1:.I1]-[.A35:.A41]-1)); 16)+(FLOOR(3*(2^([.C1:.I1]-[.A35:.A41]-1))/16)  * 10)" office:value-type="float" office:value="0.75" calcext:value-type="float">
            <text:p>0.75</text:p>
          </table:table-cell>
          <table:table-cell table:formula="of:=MOD(3*(2^([.C1:.I1]-[.A35:.A41]-1)); 16)+(FLOOR(3*(2^([.C1:.I1]-[.A35:.A41]-1))/16)  * 10)" office:value-type="float" office:value="1.5" calcext:value-type="float">
            <text:p>1.5</text:p>
          </table:table-cell>
          <table:table-cell table:formula="of:=MOD(3*(2^([.C1:.I1]-[.A35:.A41]-1)); 16)+(FLOOR(3*(2^([.C1:.I1]-[.A35:.A41]-1))/16)  * 10)" office:value-type="float" office:value="3" calcext:value-type="float">
            <text:p>3</text:p>
          </table:table-cell>
          <table:table-cell table:formula="of:=MOD(3*(2^([.C1:.I1]-[.A35:.A41]-1)); 16)+(FLOOR(3*(2^([.C1:.I1]-[.A35:.A41]-1))/16)  * 10)" office:value-type="float" office:value="6" calcext:value-type="float">
            <text:p>6</text:p>
          </table:table-cell>
          <table:table-cell table:formula="of:=MOD(3*(2^([.C1:.I1]-[.A35:.A41]-1)); 16)+(FLOOR(3*(2^([.C1:.I1]-[.A35:.A41]-1))/16)  * 1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MOD(3*(2^([.C1:.I1]-[.A35:.A41]-1)); 16)+(FLOOR(3*(2^([.C1:.I1]-[.A35:.A41]-1))/16)  * 10)" office:value-type="float" office:value="0.09375" calcext:value-type="float">
            <text:p>0.09375</text:p>
          </table:table-cell>
          <table:table-cell table:formula="of:=MOD(3*(2^([.C1:.I1]-[.A35:.A41]-1)); 16)+(FLOOR(3*(2^([.C1:.I1]-[.A35:.A41]-1))/16)  * 10)" office:value-type="float" office:value="0.1875" calcext:value-type="float">
            <text:p>0.1875</text:p>
          </table:table-cell>
          <table:table-cell table:formula="of:=MOD(3*(2^([.C1:.I1]-[.A35:.A41]-1)); 16)+(FLOOR(3*(2^([.C1:.I1]-[.A35:.A41]-1))/16)  * 10)" office:value-type="float" office:value="0.375" calcext:value-type="float">
            <text:p>0.375</text:p>
          </table:table-cell>
          <table:table-cell table:formula="of:=MOD(3*(2^([.C1:.I1]-[.A35:.A41]-1)); 16)+(FLOOR(3*(2^([.C1:.I1]-[.A35:.A41]-1))/16)  * 10)" office:value-type="float" office:value="0.75" calcext:value-type="float">
            <text:p>0.75</text:p>
          </table:table-cell>
          <table:table-cell table:formula="of:=MOD(3*(2^([.C1:.I1]-[.A35:.A41]-1)); 16)+(FLOOR(3*(2^([.C1:.I1]-[.A35:.A41]-1))/16)  * 10)" office:value-type="float" office:value="1.5" calcext:value-type="float">
            <text:p>1.5</text:p>
          </table:table-cell>
          <table:table-cell table:formula="of:=MOD(3*(2^([.C1:.I1]-[.A35:.A41]-1)); 16)+(FLOOR(3*(2^([.C1:.I1]-[.A35:.A41]-1))/16)  * 10)" office:value-type="float" office:value="3" calcext:value-type="float">
            <text:p>3</text:p>
          </table:table-cell>
          <table:table-cell table:formula="of:=MOD(3*(2^([.C1:.I1]-[.A35:.A41]-1)); 16)+(FLOOR(3*(2^([.C1:.I1]-[.A35:.A41]-1))/16)  * 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MOD(3*(2^([.C1:.I1]-[.A35:.A41]-1)); 16)+(FLOOR(3*(2^([.C1:.I1]-[.A35:.A41]-1))/16)  * 10)" office:value-type="float" office:value="0.046875" calcext:value-type="float">
            <text:p>0.046875</text:p>
          </table:table-cell>
          <table:table-cell table:formula="of:=MOD(3*(2^([.C1:.I1]-[.A35:.A41]-1)); 16)+(FLOOR(3*(2^([.C1:.I1]-[.A35:.A41]-1))/16)  * 10)" office:value-type="float" office:value="0.09375" calcext:value-type="float">
            <text:p>0.09375</text:p>
          </table:table-cell>
          <table:table-cell table:formula="of:=MOD(3*(2^([.C1:.I1]-[.A35:.A41]-1)); 16)+(FLOOR(3*(2^([.C1:.I1]-[.A35:.A41]-1))/16)  * 10)" office:value-type="float" office:value="0.1875" calcext:value-type="float">
            <text:p>0.1875</text:p>
          </table:table-cell>
          <table:table-cell table:formula="of:=MOD(3*(2^([.C1:.I1]-[.A35:.A41]-1)); 16)+(FLOOR(3*(2^([.C1:.I1]-[.A35:.A41]-1))/16)  * 10)" office:value-type="float" office:value="0.375" calcext:value-type="float">
            <text:p>0.375</text:p>
          </table:table-cell>
          <table:table-cell table:formula="of:=MOD(3*(2^([.C1:.I1]-[.A35:.A41]-1)); 16)+(FLOOR(3*(2^([.C1:.I1]-[.A35:.A41]-1))/16)  * 10)" office:value-type="float" office:value="0.75" calcext:value-type="float">
            <text:p>0.75</text:p>
          </table:table-cell>
          <table:table-cell table:formula="of:=MOD(3*(2^([.C1:.I1]-[.A35:.A41]-1)); 16)+(FLOOR(3*(2^([.C1:.I1]-[.A35:.A41]-1))/16)  * 10)" office:value-type="float" office:value="1.5" calcext:value-type="float">
            <text:p>1.5</text:p>
          </table:table-cell>
          <table:table-cell table:formula="of:=MOD(3*(2^([.C1:.I1]-[.A35:.A41]-1)); 16)+(FLOOR(3*(2^([.C1:.I1]-[.A35:.A41]-1))/16)  * 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MOD(3*(2^([.C1:.I1]-[.A35:.A41]-1)); 16)+(FLOOR(3*(2^([.C1:.I1]-[.A35:.A41]-1))/16)  * 10)" office:value-type="float" office:value="0.0234375" calcext:value-type="float">
            <text:p>0.0234375</text:p>
          </table:table-cell>
          <table:table-cell table:formula="of:=MOD(3*(2^([.C1:.I1]-[.A35:.A41]-1)); 16)+(FLOOR(3*(2^([.C1:.I1]-[.A35:.A41]-1))/16)  * 10)" office:value-type="float" office:value="0.046875" calcext:value-type="float">
            <text:p>0.046875</text:p>
          </table:table-cell>
          <table:table-cell table:formula="of:=MOD(3*(2^([.C1:.I1]-[.A35:.A41]-1)); 16)+(FLOOR(3*(2^([.C1:.I1]-[.A35:.A41]-1))/16)  * 10)" office:value-type="float" office:value="0.09375" calcext:value-type="float">
            <text:p>0.09375</text:p>
          </table:table-cell>
          <table:table-cell table:formula="of:=MOD(3*(2^([.C1:.I1]-[.A35:.A41]-1)); 16)+(FLOOR(3*(2^([.C1:.I1]-[.A35:.A41]-1))/16)  * 10)" office:value-type="float" office:value="0.1875" calcext:value-type="float">
            <text:p>0.1875</text:p>
          </table:table-cell>
          <table:table-cell table:formula="of:=MOD(3*(2^([.C1:.I1]-[.A35:.A41]-1)); 16)+(FLOOR(3*(2^([.C1:.I1]-[.A35:.A41]-1))/16)  * 10)" office:value-type="float" office:value="0.375" calcext:value-type="float">
            <text:p>0.375</text:p>
          </table:table-cell>
          <table:table-cell table:formula="of:=MOD(3*(2^([.C1:.I1]-[.A35:.A41]-1)); 16)+(FLOOR(3*(2^([.C1:.I1]-[.A35:.A41]-1))/16)  * 10)" office:value-type="float" office:value="0.75" calcext:value-type="float">
            <text:p>0.75</text:p>
          </table:table-cell>
          <table:table-cell table:formula="of:=MOD(3*(2^([.C1:.I1]-[.A35:.A41]-1)); 16)+(FLOOR(3*(2^([.C1:.I1]-[.A35:.A41]-1))/16)  * 10)" office:value-type="float" office:value="1.5" calcext:value-type="float">
            <text:p>1.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MOD(5*(2^([.C1:.I1]-[.A43:.A49]-1)); 16)+(FLOOR(5*(2^([.C1:.I1]-[.A43:.A49]-1))/16)  * 10)" office:value-type="float" office:value="2.5" calcext:value-type="float">
            <text:p>2.5</text:p>
          </table:table-cell>
          <table:table-cell table:formula="of:=MOD(5*(2^([.C1:.I1]-[.A43:.A49]-1)); 16)+(FLOOR(5*(2^([.C1:.I1]-[.A43:.A49]-1))/16)  * 10)" office:value-type="float" office:value="5" calcext:value-type="float">
            <text:p>5</text:p>
          </table:table-cell>
          <table:table-cell table:formula="of:=MOD(5*(2^([.C1:.I1]-[.A43:.A49]-1)); 16)+(FLOOR(5*(2^([.C1:.I1]-[.A43:.A49]-1))/16)  * 10)" office:value-type="float" office:value="10" calcext:value-type="float">
            <text:p>10</text:p>
          </table:table-cell>
          <table:table-cell table:formula="of:=MOD(5*(2^([.C1:.I1]-[.A43:.A49]-1)); 16)+(FLOOR(5*(2^([.C1:.I1]-[.A43:.A49]-1))/16)  * 10)" office:value-type="float" office:value="14" calcext:value-type="float">
            <text:p>14</text:p>
          </table:table-cell>
          <table:table-cell table:formula="of:=MOD(5*(2^([.C1:.I1]-[.A43:.A49]-1)); 16)+(FLOOR(5*(2^([.C1:.I1]-[.A43:.A49]-1))/16)  * 10)" office:value-type="float" office:value="28" calcext:value-type="float">
            <text:p>28</text:p>
          </table:table-cell>
          <table:table-cell table:formula="of:=MOD(5*(2^([.C1:.I1]-[.A43:.A49]-1)); 16)+(FLOOR(5*(2^([.C1:.I1]-[.A43:.A49]-1))/16)  * 10)" office:value-type="float" office:value="50" calcext:value-type="float">
            <text:p>50</text:p>
          </table:table-cell>
          <table:table-cell table:formula="of:=MOD(5*(2^([.C1:.I1]-[.A43:.A49]-1)); 16)+(FLOOR(5*(2^([.C1:.I1]-[.A43:.A49]-1))/16)  * 1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MOD(5*(2^([.C1:.I1]-[.A43:.A49]-1)); 16)+(FLOOR(5*(2^([.C1:.I1]-[.A43:.A49]-1))/16)  * 10)" office:value-type="float" office:value="1.25" calcext:value-type="float">
            <text:p>1.25</text:p>
          </table:table-cell>
          <table:table-cell table:formula="of:=MOD(5*(2^([.C1:.I1]-[.A43:.A49]-1)); 16)+(FLOOR(5*(2^([.C1:.I1]-[.A43:.A49]-1))/16)  * 10)" office:value-type="float" office:value="2.5" calcext:value-type="float">
            <text:p>2.5</text:p>
          </table:table-cell>
          <table:table-cell table:formula="of:=MOD(5*(2^([.C1:.I1]-[.A43:.A49]-1)); 16)+(FLOOR(5*(2^([.C1:.I1]-[.A43:.A49]-1))/16)  * 10)" office:value-type="float" office:value="5" calcext:value-type="float">
            <text:p>5</text:p>
          </table:table-cell>
          <table:table-cell table:formula="of:=MOD(5*(2^([.C1:.I1]-[.A43:.A49]-1)); 16)+(FLOOR(5*(2^([.C1:.I1]-[.A43:.A49]-1))/16)  * 10)" office:value-type="float" office:value="10" calcext:value-type="float">
            <text:p>10</text:p>
          </table:table-cell>
          <table:table-cell table:formula="of:=MOD(5*(2^([.C1:.I1]-[.A43:.A49]-1)); 16)+(FLOOR(5*(2^([.C1:.I1]-[.A43:.A49]-1))/16)  * 10)" office:value-type="float" office:value="14" calcext:value-type="float">
            <text:p>14</text:p>
          </table:table-cell>
          <table:table-cell table:formula="of:=MOD(5*(2^([.C1:.I1]-[.A43:.A49]-1)); 16)+(FLOOR(5*(2^([.C1:.I1]-[.A43:.A49]-1))/16)  * 10)" office:value-type="float" office:value="28" calcext:value-type="float">
            <text:p>28</text:p>
          </table:table-cell>
          <table:table-cell table:formula="of:=MOD(5*(2^([.C1:.I1]-[.A43:.A49]-1)); 16)+(FLOOR(5*(2^([.C1:.I1]-[.A43:.A49]-1))/16)  * 1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MOD(5*(2^([.C1:.I1]-[.A43:.A49]-1)); 16)+(FLOOR(5*(2^([.C1:.I1]-[.A43:.A49]-1))/16)  * 10)" office:value-type="float" office:value="0.625" calcext:value-type="float">
            <text:p>0.625</text:p>
          </table:table-cell>
          <table:table-cell table:formula="of:=MOD(5*(2^([.C1:.I1]-[.A43:.A49]-1)); 16)+(FLOOR(5*(2^([.C1:.I1]-[.A43:.A49]-1))/16)  * 10)" office:value-type="float" office:value="1.25" calcext:value-type="float">
            <text:p>1.25</text:p>
          </table:table-cell>
          <table:table-cell table:formula="of:=MOD(5*(2^([.C1:.I1]-[.A43:.A49]-1)); 16)+(FLOOR(5*(2^([.C1:.I1]-[.A43:.A49]-1))/16)  * 10)" office:value-type="float" office:value="2.5" calcext:value-type="float">
            <text:p>2.5</text:p>
          </table:table-cell>
          <table:table-cell table:formula="of:=MOD(5*(2^([.C1:.I1]-[.A43:.A49]-1)); 16)+(FLOOR(5*(2^([.C1:.I1]-[.A43:.A49]-1))/16)  * 10)" office:value-type="float" office:value="5" calcext:value-type="float">
            <text:p>5</text:p>
          </table:table-cell>
          <table:table-cell table:formula="of:=MOD(5*(2^([.C1:.I1]-[.A43:.A49]-1)); 16)+(FLOOR(5*(2^([.C1:.I1]-[.A43:.A49]-1))/16)  * 10)" office:value-type="float" office:value="10" calcext:value-type="float">
            <text:p>10</text:p>
          </table:table-cell>
          <table:table-cell table:formula="of:=MOD(5*(2^([.C1:.I1]-[.A43:.A49]-1)); 16)+(FLOOR(5*(2^([.C1:.I1]-[.A43:.A49]-1))/16)  * 10)" office:value-type="float" office:value="14" calcext:value-type="float">
            <text:p>14</text:p>
          </table:table-cell>
          <table:table-cell table:formula="of:=MOD(5*(2^([.C1:.I1]-[.A43:.A49]-1)); 16)+(FLOOR(5*(2^([.C1:.I1]-[.A43:.A49]-1))/16)  * 1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MOD(5*(2^([.C1:.I1]-[.A43:.A49]-1)); 16)+(FLOOR(5*(2^([.C1:.I1]-[.A43:.A49]-1))/16)  * 10)" office:value-type="float" office:value="0.3125" calcext:value-type="float">
            <text:p>0.3125</text:p>
          </table:table-cell>
          <table:table-cell table:formula="of:=MOD(5*(2^([.C1:.I1]-[.A43:.A49]-1)); 16)+(FLOOR(5*(2^([.C1:.I1]-[.A43:.A49]-1))/16)  * 10)" office:value-type="float" office:value="0.625" calcext:value-type="float">
            <text:p>0.625</text:p>
          </table:table-cell>
          <table:table-cell table:formula="of:=MOD(5*(2^([.C1:.I1]-[.A43:.A49]-1)); 16)+(FLOOR(5*(2^([.C1:.I1]-[.A43:.A49]-1))/16)  * 10)" office:value-type="float" office:value="1.25" calcext:value-type="float">
            <text:p>1.25</text:p>
          </table:table-cell>
          <table:table-cell table:formula="of:=MOD(5*(2^([.C1:.I1]-[.A43:.A49]-1)); 16)+(FLOOR(5*(2^([.C1:.I1]-[.A43:.A49]-1))/16)  * 10)" office:value-type="float" office:value="2.5" calcext:value-type="float">
            <text:p>2.5</text:p>
          </table:table-cell>
          <table:table-cell table:formula="of:=MOD(5*(2^([.C1:.I1]-[.A43:.A49]-1)); 16)+(FLOOR(5*(2^([.C1:.I1]-[.A43:.A49]-1))/16)  * 10)" office:value-type="float" office:value="5" calcext:value-type="float">
            <text:p>5</text:p>
          </table:table-cell>
          <table:table-cell table:formula="of:=MOD(5*(2^([.C1:.I1]-[.A43:.A49]-1)); 16)+(FLOOR(5*(2^([.C1:.I1]-[.A43:.A49]-1))/16)  * 10)" office:value-type="float" office:value="10" calcext:value-type="float">
            <text:p>10</text:p>
          </table:table-cell>
          <table:table-cell table:formula="of:=MOD(5*(2^([.C1:.I1]-[.A43:.A49]-1)); 16)+(FLOOR(5*(2^([.C1:.I1]-[.A43:.A49]-1))/16)  * 1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MOD(5*(2^([.C1:.I1]-[.A43:.A49]-1)); 16)+(FLOOR(5*(2^([.C1:.I1]-[.A43:.A49]-1))/16)  * 10)" office:value-type="float" office:value="0.15625" calcext:value-type="float">
            <text:p>0.15625</text:p>
          </table:table-cell>
          <table:table-cell table:formula="of:=MOD(5*(2^([.C1:.I1]-[.A43:.A49]-1)); 16)+(FLOOR(5*(2^([.C1:.I1]-[.A43:.A49]-1))/16)  * 10)" office:value-type="float" office:value="0.3125" calcext:value-type="float">
            <text:p>0.3125</text:p>
          </table:table-cell>
          <table:table-cell table:formula="of:=MOD(5*(2^([.C1:.I1]-[.A43:.A49]-1)); 16)+(FLOOR(5*(2^([.C1:.I1]-[.A43:.A49]-1))/16)  * 10)" office:value-type="float" office:value="0.625" calcext:value-type="float">
            <text:p>0.625</text:p>
          </table:table-cell>
          <table:table-cell table:formula="of:=MOD(5*(2^([.C1:.I1]-[.A43:.A49]-1)); 16)+(FLOOR(5*(2^([.C1:.I1]-[.A43:.A49]-1))/16)  * 10)" office:value-type="float" office:value="1.25" calcext:value-type="float">
            <text:p>1.25</text:p>
          </table:table-cell>
          <table:table-cell table:formula="of:=MOD(5*(2^([.C1:.I1]-[.A43:.A49]-1)); 16)+(FLOOR(5*(2^([.C1:.I1]-[.A43:.A49]-1))/16)  * 10)" office:value-type="float" office:value="2.5" calcext:value-type="float">
            <text:p>2.5</text:p>
          </table:table-cell>
          <table:table-cell table:formula="of:=MOD(5*(2^([.C1:.I1]-[.A43:.A49]-1)); 16)+(FLOOR(5*(2^([.C1:.I1]-[.A43:.A49]-1))/16)  * 10)" office:value-type="float" office:value="5" calcext:value-type="float">
            <text:p>5</text:p>
          </table:table-cell>
          <table:table-cell table:formula="of:=MOD(5*(2^([.C1:.I1]-[.A43:.A49]-1)); 16)+(FLOOR(5*(2^([.C1:.I1]-[.A43:.A49]-1))/16)  * 1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MOD(5*(2^([.C1:.I1]-[.A43:.A49]-1)); 16)+(FLOOR(5*(2^([.C1:.I1]-[.A43:.A49]-1))/16)  * 10)" office:value-type="float" office:value="0.078125" calcext:value-type="float">
            <text:p>0.078125</text:p>
          </table:table-cell>
          <table:table-cell table:formula="of:=MOD(5*(2^([.C1:.I1]-[.A43:.A49]-1)); 16)+(FLOOR(5*(2^([.C1:.I1]-[.A43:.A49]-1))/16)  * 10)" office:value-type="float" office:value="0.15625" calcext:value-type="float">
            <text:p>0.15625</text:p>
          </table:table-cell>
          <table:table-cell table:formula="of:=MOD(5*(2^([.C1:.I1]-[.A43:.A49]-1)); 16)+(FLOOR(5*(2^([.C1:.I1]-[.A43:.A49]-1))/16)  * 10)" office:value-type="float" office:value="0.3125" calcext:value-type="float">
            <text:p>0.3125</text:p>
          </table:table-cell>
          <table:table-cell table:formula="of:=MOD(5*(2^([.C1:.I1]-[.A43:.A49]-1)); 16)+(FLOOR(5*(2^([.C1:.I1]-[.A43:.A49]-1))/16)  * 10)" office:value-type="float" office:value="0.625" calcext:value-type="float">
            <text:p>0.625</text:p>
          </table:table-cell>
          <table:table-cell table:formula="of:=MOD(5*(2^([.C1:.I1]-[.A43:.A49]-1)); 16)+(FLOOR(5*(2^([.C1:.I1]-[.A43:.A49]-1))/16)  * 10)" office:value-type="float" office:value="1.25" calcext:value-type="float">
            <text:p>1.25</text:p>
          </table:table-cell>
          <table:table-cell table:formula="of:=MOD(5*(2^([.C1:.I1]-[.A43:.A49]-1)); 16)+(FLOOR(5*(2^([.C1:.I1]-[.A43:.A49]-1))/16)  * 10)" office:value-type="float" office:value="2.5" calcext:value-type="float">
            <text:p>2.5</text:p>
          </table:table-cell>
          <table:table-cell table:formula="of:=MOD(5*(2^([.C1:.I1]-[.A43:.A49]-1)); 16)+(FLOOR(5*(2^([.C1:.I1]-[.A43:.A49]-1))/16)  * 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MOD(5*(2^([.C1:.I1]-[.A43:.A49]-1)); 16)+(FLOOR(5*(2^([.C1:.I1]-[.A43:.A49]-1))/16)  * 10)" office:value-type="float" office:value="0.0390625" calcext:value-type="float">
            <text:p>0.0390625</text:p>
          </table:table-cell>
          <table:table-cell table:formula="of:=MOD(5*(2^([.C1:.I1]-[.A43:.A49]-1)); 16)+(FLOOR(5*(2^([.C1:.I1]-[.A43:.A49]-1))/16)  * 10)" office:value-type="float" office:value="0.078125" calcext:value-type="float">
            <text:p>0.078125</text:p>
          </table:table-cell>
          <table:table-cell table:formula="of:=MOD(5*(2^([.C1:.I1]-[.A43:.A49]-1)); 16)+(FLOOR(5*(2^([.C1:.I1]-[.A43:.A49]-1))/16)  * 10)" office:value-type="float" office:value="0.15625" calcext:value-type="float">
            <text:p>0.15625</text:p>
          </table:table-cell>
          <table:table-cell table:formula="of:=MOD(5*(2^([.C1:.I1]-[.A43:.A49]-1)); 16)+(FLOOR(5*(2^([.C1:.I1]-[.A43:.A49]-1))/16)  * 10)" office:value-type="float" office:value="0.3125" calcext:value-type="float">
            <text:p>0.3125</text:p>
          </table:table-cell>
          <table:table-cell table:formula="of:=MOD(5*(2^([.C1:.I1]-[.A43:.A49]-1)); 16)+(FLOOR(5*(2^([.C1:.I1]-[.A43:.A49]-1))/16)  * 10)" office:value-type="float" office:value="0.625" calcext:value-type="float">
            <text:p>0.625</text:p>
          </table:table-cell>
          <table:table-cell table:formula="of:=MOD(5*(2^([.C1:.I1]-[.A43:.A49]-1)); 16)+(FLOOR(5*(2^([.C1:.I1]-[.A43:.A49]-1))/16)  * 10)" office:value-type="float" office:value="1.25" calcext:value-type="float">
            <text:p>1.25</text:p>
          </table:table-cell>
          <table:table-cell table:formula="of:=MOD(5*(2^([.C1:.I1]-[.A43:.A49]-1)); 16)+(FLOOR(5*(2^([.C1:.I1]-[.A43:.A49]-1))/16)  * 10)"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 style:data-style-name="N2" text:time-value="12:49:26.924746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2T22:39:04.108633803</meta:creation-date>
    <dc:date>2025-04-23T13:20:43.030530708</dc:date>
    <meta:editing-duration>PT1H11M12S</meta:editing-duration>
    <meta:editing-cycles>7</meta:editing-cycles>
    <meta:generator>LibreOffice/6.4.7.2$Linux_X86_64 LibreOffice_project/40$Build-2</meta:generator>
    <meta:document-statistic meta:table-count="1" meta:cell-count="346" meta:object-count="0"/>
  </office:meta>
</office:document-meta>
</file>